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erial" svg:font-family="Ae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erial" fo:font-weight="bold"/>
    </style:style>
    <style:style style:name="P2" style:family="paragraph" style:parent-style-name="Standard">
      <style:text-properties style:font-name="Aerial"/>
    </style:style>
    <style:style style:name="P3" style:family="paragraph" style:parent-style-name="Heading_20_3">
      <style:text-properties fo:font-weight="bold"/>
    </style:style>
    <style:style style:name="P4" style:family="paragraph" style:parent-style-name="Heading_20_4">
      <style:text-properties fo:font-weight="bold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text-properties fo:font-style="italic"/>
    </style:style>
    <style:style style:name="P7" style:family="paragraph" style:parent-style-name="Text_20_body">
      <style:text-properties officeooo:paragraph-rsid="001de20a"/>
    </style:style>
    <style:style style:name="P8" style:family="paragraph" style:parent-style-name="Heading_20_3">
      <style:text-properties fo:font-weight="bold" officeooo:paragraph-rsid="002085cd"/>
    </style:style>
    <style:style style:name="P9" style:family="paragraph" style:parent-style-name="Heading_20_3">
      <style:paragraph-properties fo:margin-left="0cm" fo:margin-top="0.146cm" fo:margin-bottom="0.111cm" style:contextual-spacing="false" fo:text-indent="0cm" style:auto-text-indent="false"/>
      <style:text-properties fo:font-weight="bold"/>
    </style:style>
    <style:style style:name="P10" style:family="paragraph" style:parent-style-name="Heading_20_4">
      <style:text-properties fo:font-weight="bold"/>
    </style:style>
    <style:style style:name="P11" style:family="paragraph" style:parent-style-name="Text_20_body" style:list-style-name="L1">
      <style:paragraph-properties fo:margin-top="0cm" fo:margin-bottom="0.046cm" style:contextual-spacing="false"/>
      <style:text-properties officeooo:paragraph-rsid="002085cd"/>
    </style:style>
    <style:style style:name="P12" style:family="paragraph" style:parent-style-name="Text_20_body" style:list-style-name="L1">
      <style:paragraph-properties fo:margin-top="0cm" fo:margin-bottom="0.046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5" style:family="paragraph" style:parent-style-name="Text_20_body">
      <style:text-properties officeooo:paragraph-rsid="00214d4c"/>
    </style:style>
    <style:style style:name="P16" style:family="paragraph" style:parent-style-name="Text_20_body" style:list-style-name="L8">
      <style:paragraph-properties fo:margin-top="0cm" fo:margin-bottom="0.046cm" style:contextual-spacing="false" fo:line-height="100%"/>
    </style:style>
    <style:style style:name="P17" style:family="paragraph" style:parent-style-name="Text_20_body">
      <style:paragraph-properties fo:margin-top="0cm" fo:margin-bottom="0.046cm" style:contextual-spacing="false" fo:line-height="100%"/>
    </style:style>
    <style:style style:name="P18" style:family="paragraph" style:parent-style-name="Text_20_body">
      <style:paragraph-properties fo:margin-top="0cm" fo:margin-bottom="0.046cm" style:contextual-spacing="false" fo:line-height="100%"/>
      <style:text-properties officeooo:paragraph-rsid="00214d4c"/>
    </style:style>
    <style:style style:name="P19" style:family="paragraph" style:parent-style-name="Text_20_body" style:list-style-name="L12">
      <style:paragraph-properties fo:margin-top="0cm" fo:margin-bottom="0.046cm" style:contextual-spacing="false" fo:line-height="100%"/>
      <style:text-properties officeooo:paragraph-rsid="00214d4c"/>
    </style:style>
    <style:style style:name="P20" style:family="paragraph" style:parent-style-name="Text_20_body" style:list-style-name="L12">
      <style:paragraph-properties fo:margin-top="0cm" fo:margin-bottom="0.046cm" style:contextual-spacing="false" fo:line-height="100%"/>
    </style:style>
    <style:style style:name="P21" style:family="paragraph" style:parent-style-name="Text_20_body" style:list-style-name="L13">
      <style:paragraph-properties fo:margin-top="0cm" fo:margin-bottom="0.046cm" style:contextual-spacing="false" fo:line-height="100%"/>
      <style:text-properties officeooo:paragraph-rsid="00214d4c"/>
    </style:style>
    <style:style style:name="T1" style:family="text">
      <style:text-properties fo:font-weight="bold"/>
    </style:style>
    <style:style style:name="T2" style:family="text">
      <style:text-properties fo:font-weight="bold" officeooo:rsid="002085cd"/>
    </style:style>
    <style:style style:name="T3" style:family="text">
      <style:text-properties fo:font-weight="bold" officeooo:rsid="00214d4c"/>
    </style:style>
    <style:style style:name="T4" style:family="text">
      <style:text-properties officeooo:rsid="002085cd"/>
    </style:style>
    <style:style style:name="T5" style:family="text">
      <style:text-properties officeooo:rsid="00214d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thieu ZIMERIS</text:h>
      <text:p text:style-name="P5">Développeur Web Full-Stack Junior</text:p>
      <text:p text:style-name="P7">📍 Région Parisienne | 📧 <text:a xlink:type="simple" xlink:href="mailto:mathieu.zimeris@gmail.com" office:target-frame-name="_blank" xlink:show="new" text:style-name="Internet_20_link" text:visited-style-name="Visited_20_Internet_20_Link">mathieu.zimeris@gmail.com</text:a> | 📞 06 03 02 33 83 </text:p>
      <text:p text:style-name="Horizontal_20_Line"/>
      <text:h text:style-name="P9" text:outline-level="3">PROFIL</text:h>
      <text:p text:style-name="Text_20_body">Développeur web full-stack en formation à l’École 42, avec 15 ans d’expérience en management, analyse métier et accompagnement des équipes dans un environnement mutualiste.</text:p>
      <text:p text:style-name="Text_20_body">Mon parcours m’a permis de développer une forte capacité à faire le lien entre besoins utilisateurs et solutions techniques, piloter des changements d’outils et accompagner leur adoption sur le terrain.</text:p>
      <text:p text:style-name="Text_20_body">Aujourd’hui, je mets cette expérience au service du développement d’applications web modernes et je recherche un environnement à impact, proche des métiers et des utilisateurs, notamment dans les secteurs de la santé, du médico-social et de l’ESS.</text:p>
      <text:p text:style-name="Horizontal_20_Line"/>
      <text:h text:style-name="P8" text:outline-level="3">COMPÉTENCES CLÉS</text:h>
      <text:list text:style-name="L1">
        <text:list-item>
          <text:p text:style-name="P11"><text:span text:style-name="T1">Développement :</text:span> <text:span text:style-name="T4">JavaScript, TypeScript, HTML5, CSS3<text:line-break/>React, Next.js, Node.js, API REST</text:span></text:p>
        </text:list-item>
        <text:list-item>
          <text:p text:style-name="P12"><text:span text:style-name="T2">Base de données</text:span><text:span text:style-name="T1"> :</text:span> <text:span text:style-name="T4">PostgreSQL, SQL, MySQL, Architecture Applicative</text:span>.</text:p>
        </text:list-item>
        <text:list-item>
          <text:p text:style-name="P12"><text:span text:style-name="T2">Outils &amp; Environnement</text:span><text:span text:style-name="T1"> :</text:span><text:span text:style-name="T2"> Docker, Git, Linux</text:span>.</text:p>
        </text:list-item>
        <text:list-item>
          <text:p text:style-name="P12"><text:span text:style-name="T2">Methodes</text:span><text:span text:style-name="T1"> :</text:span> <text:span text:style-name="T4">Analyse Métier, Travail transverse, Agile, Résolution de problèmes, Communication et accompagnement utilisateurs</text:span>.</text:p>
        </text:list-item>
      </text:list>
      <text:p text:style-name="Horizontal_20_Line"/>
      <text:h text:style-name="P3" text:outline-level="3">EXPÉRIENCE PROFESSIONNELLE</text:h>
      <text:h text:style-name="P4" text:outline-level="4">Directeur de Magasin Mutualiste | Écouter Voir</text:h>
      <text:p text:style-name="P6">2012 – 2023</text:p>
      <text:p text:style-name="P14">Management &amp; coordination<text:span text:style-name="T4"> </text:span>:</text:p>
      <text:list text:style-name="L8">
        <text:list-item>
          <text:p text:style-name="P16">Encadrement et accompagnement d’équipe dans un environnement mutualiste.</text:p>
        </text:list-item>
        <text:list-item>
          <text:p text:style-name="P16">Pilotage opérationnel et conduite du changement.</text:p>
        </text:list-item>
      </text:list>
      <text:p text:style-name="P14">Transmission &amp; accompagnement:</text:p>
      <text:list text:continue-numbering="true" text:style-name="L8">
        <text:list-item>
          <text:p text:style-name="P16">Formation des collaborateurs et création de supports pédagogiques.</text:p>
        </text:list-item>
        <text:list-item>
          <text:p text:style-name="P16">Mise en autonomie des équipes sur les nouveaux outils.</text:p>
        </text:list-item>
      </text:list>
      <text:p text:style-name="P17"><text:span text:style-name="T1">Transformation numérique &amp; amélioration continue</text:span><text:span text:style-name="T3"> :</text:span></text:p>
      <text:list text:continue-numbering="true" text:style-name="L8">
        <text:list-item>
          <text:p text:style-name="P16">Pilotage du déploiement d’un logiciel métier : paramétrage, accompagnement des utilisateurs et adaptation des processus.</text:p>
        </text:list-item>
        <text:list-item>
          <text:p text:style-name="P16">Recueil des besoins terrain et collaboration avec les équipes techniques.</text:p>
        </text:list-item>
        <text:list-item>
          <text:p text:style-name="P16">Réalisation de tests fonctionnels et remontée d’anomalies critiques.</text:p>
        </text:list-item>
        <text:list-item>
          <text:p text:style-name="P16">Participation à l’amélioration continue des outils et processus.</text:p>
        </text:list-item>
      </text:list>
      <text:h text:style-name="P4" text:outline-level="4"><text:soft-page-break/>Opticien Lunetier | Indépendants et Franchisés</text:h>
      <text:p text:style-name="P6">2008 – 2012</text:p>
      <text:list text:style-name="L12">
        <text:list-item>
          <text:p text:style-name="P20">Analyse des besoins clients et résolution de problématiques complexes.</text:p>
        </text:list-item>
        <text:list-item>
          <text:p text:style-name="P19">Coordination avec partenaires et amélioration des processus.</text:p>
        </text:list-item>
        <text:list-item>
          <text:p text:style-name="P19">Création de supports d’intégration et accompagnement des nouveaux arrivants.</text:p>
        </text:list-item>
      </text:list>
      <text:p text:style-name="Horizontal_20_Line"/>
      <text:h text:style-name="P3" text:outline-level="3">FORMATIONS &amp; PROJETS TECH</text:h>
      <text:h text:style-name="P4" text:outline-level="4">École 42 | Tronc Commun (En cours, fin prévue 2026)</text:h>
      <text:list text:style-name="L13">
        <text:list-item>
          <text:p text:style-name="P21">Formation orientée algorithmique, architecture logicielle et développement système.</text:p>
        </text:list-item>
        <text:list-item>
          <text:p text:style-name="P21">Travail en équipe, autonomie et approche projet.</text:p>
        </text:list-item>
      </text:list>
      <text:p text:style-name="P18"/>
      <text:p text:style-name="P18">Projet Transcendance<text:span text:style-name="T5"> (en cours)</text:span> — Application Web Full-Stack</text:p>
      <text:p text:style-name="P15">Stack : Node.js • React • Next.js • PostgreSQL<text:span text:style-name="T5"> • Docker Compose</text:span></text:p>
      <text:list text:continue-numbering="true" text:style-name="L13">
        <text:list-item>
          <text:p text:style-name="P21">Développement d’une application web complète en équipe.</text:p>
        </text:list-item>
        <text:list-item>
          <text:p text:style-name="P21">Conception et implémentation de fonctionnalités front-end et back-end.</text:p>
        </text:list-item>
        <text:list-item>
          <text:p text:style-name="P21">Gestion des données et interactions avec PostgreSQL.</text:p>
        </text:list-item>
        <text:list-item>
          <text:p text:style-name="P21">Débogage et suivi du comportement applicatif.</text:p>
        </text:list-item>
        <text:list-item>
          <text:p text:style-name="P21">Collaboration via Git et méthodologie projet.</text:p>
        </text:list-item>
      </text:list>
      <text:p text:style-name="P18"/>
      <text:h text:style-name="P4" text:outline-level="4">Le Wagon | Bootcamp Développement Web (2023)</text:h>
      <text:list text:continue-numbering="true" text:style-name="L13">
        <text:list-item>
          <text:p text:style-name="P21">Développement d'une application full-stack (Ruby on Rails).</text:p>
        </text:list-item>
        <text:list-item>
          <text:p text:style-name="P21">Maîtrise de l'architecture MVC, des API et du travail en équipe agile.</text:p>
        </text:list-item>
      </text:list>
      <text:h text:style-name="P4" text:outline-level="4">BTS Opticien Lunetier | ISO Paris (2008)</text:h>
      <text:p text:style-name="Horizontal_20_Line"/>
      <text:h text:style-name="P3" text:outline-level="3">LANGUES &amp; CENTRES D’INTÉRÊT</text:h>
      <text:list text:continue-numbering="true" text:style-name="L13">
        <text:list-item>
          <text:p text:style-name="P21">Langues : Français (Maternel), Anglais (Courant).</text:p>
        </text:list-item>
        <text:list-item>
          <text:p text:style-name="P21">Arts Martiaux : Pratique du sabre japonais traditionnel (12 ans)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erial" svg:font-family="Ae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4:01:36.803464398</meta:creation-date>
    <dc:date>2026-06-28T16:47:52.478769891</dc:date>
    <meta:editing-duration>PT26M32S</meta:editing-duration>
    <meta:editing-cycles>3</meta:editing-cycles>
    <meta:generator>LibreOffice/24.2.7.2$Linux_X86_64 LibreOffice_project/420$Build-2</meta:generator>
    <meta:print-date>2026-02-26T14:25:43.759738799</meta:print-date>
    <meta:printed-by>Fichiers PDF</meta:printed-by>
    <meta:document-statistic meta:table-count="0" meta:image-count="0" meta:object-count="0" meta:page-count="2" meta:paragraph-count="49" meta:word-count="444" meta:character-count="3075" meta:non-whitespace-character-count="2702"/>
  </office:meta>
</office:document-meta>
</file>